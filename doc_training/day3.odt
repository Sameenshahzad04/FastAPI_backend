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paragraph-rsid="00113c47"/>
    </style:style>
    <style:style style:name="P2" style:family="paragraph" style:parent-style-name="Heading_20_4">
      <style:text-properties style:font-name="Arial"/>
    </style:style>
    <style:style style:name="P3" style:family="paragraph" style:parent-style-name="Heading_20_1">
      <style:text-properties style:font-name="Arial" officeooo:paragraph-rsid="00113c47"/>
    </style:style>
    <style:style style:name="P4" style:family="paragraph" style:parent-style-name="Text_20_body">
      <style:text-properties style:font-name="Arial"/>
    </style:style>
    <style:style style:name="P5" style:family="paragraph" style:parent-style-name="Heading">
      <style:text-properties style:font-name="Arial" fo:font-weight="bold" officeooo:rsid="0015d03b" officeooo:paragraph-rsid="0015d03b" style:font-weight-asian="bold" style:font-weight-complex="bold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style:font-name="Arial"/>
    </style:style>
    <style:style style:name="P8" style:family="paragraph" style:parent-style-name="Text_20_body">
      <style:paragraph-properties fo:line-height="100%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 style:list-style-name="L1">
      <style:paragraph-properties fo:line-height="100%"/>
      <style:text-properties style:font-name="Arial" fo:font-weight="bold" style:font-weight-asian="bold" style:font-weight-complex="bold"/>
    </style:style>
    <style:style style:name="P10" style:family="paragraph" style:parent-style-name="Text_20_body">
      <style:text-properties style:font-name="Arial" fo:font-weight="bold" style:font-weight-asian="bold" style:font-weight-complex="bold"/>
    </style:style>
    <style:style style:name="P11" style:family="paragraph" style:parent-style-name="Heading">
      <style:text-properties style:font-name="Arial" fo:font-weight="bold" style:font-weight-asian="bold" style:font-weight-complex="bold"/>
    </style:style>
    <style:style style:name="P12" style:family="paragraph" style:parent-style-name="Text_20_body">
      <style:text-properties style:font-name="Arial" fo:font-weight="bold" officeooo:rsid="0014bfb3" officeooo:paragraph-rsid="0014bfb3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14bfb3" style:font-weight-asian="bold" style:font-weight-complex="bold"/>
    </style:style>
    <style:style style:name="P14" style:family="paragraph" style:parent-style-name="Text_20_body">
      <style:text-properties style:font-name="Arial" officeooo:paragraph-rsid="00137051"/>
    </style:style>
    <style:style style:name="P15" style:family="paragraph" style:parent-style-name="Text_20_body" style:list-style-name="L3">
      <style:text-properties style:font-name="Arial"/>
    </style:style>
    <style:style style:name="P16" style:family="paragraph" style:parent-style-name="Text_20_body" style:list-style-name="L4">
      <style:text-properties style:font-name="Arial"/>
    </style:style>
    <style:style style:name="P17" style:family="paragraph" style:parent-style-name="Text_20_body" style:list-style-name="L5">
      <style:text-properties style:font-name="Arial"/>
    </style:style>
    <style:style style:name="P18" style:family="paragraph" style:parent-style-name="Text_20_body" style:list-style-name="L5"/>
    <style:style style:name="P1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</style:style>
    <style:style style:name="P21" style:family="paragraph" style:parent-style-name="Heading_20_4">
      <style:text-properties style:font-name="Arial" fo:font-weight="bold" style:font-weight-asian="bold" style:font-weight-complex="bold"/>
    </style:style>
    <style:style style:name="P22" style:family="paragraph" style:parent-style-name="Text_20_body">
      <style:text-properties fo:font-weight="bold" officeooo:paragraph-rsid="0015d03b" style:font-weight-asian="bold" style:font-weight-complex="bold"/>
    </style:style>
    <style:style style:name="P23" style:family="paragraph" style:parent-style-name="Text_20_body">
      <style:text-properties style:font-name="Arial" fo:font-weight="bold" officeooo:paragraph-rsid="0015d03b" style:font-weight-asian="bold" style:font-weight-complex="bold"/>
    </style:style>
    <style:style style:name="P24" style:family="paragraph" style:parent-style-name="Text_20_body" style:list-style-name="L6">
      <style:text-properties style:font-name="Arial" fo:font-weight="bold" style:font-weight-asian="bold" style:font-weight-complex="bold"/>
    </style:style>
    <style:style style:name="P25" style:family="paragraph" style:parent-style-name="Text_20_body">
      <style:text-properties style:font-name="Arial" fo:font-weight="normal" style:font-weight-asian="normal" style:font-weight-complex="normal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8" style:family="paragraph" style:parent-style-name="Preformatted_20_Text">
      <style:paragraph-properties fo:margin-top="0in" fo:margin-bottom="0.0972in" style:contextual-spacing="false" fo:line-height="115%" style:writing-mode="lr-tb"/>
      <style:text-properties fo:font-weight="bold" officeooo:paragraph-rsid="001b6518" style:font-weight-asian="bold" style:font-weight-complex="bold"/>
    </style:style>
    <style:style style:name="P29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Arial" fo:font-weight="bold" style:font-weight-asian="bold" style:font-weight-complex="bold"/>
    </style:style>
    <style:style style:name="P30" style:family="paragraph" style:parent-style-name="Preformatted_20_Text">
      <style:paragraph-properties fo:margin-top="0in" fo:margin-bottom="0.0972in" style:contextual-spacing="false" fo:line-height="115%" style:writing-mode="lr-tb"/>
      <style:text-properties fo:font-weight="bold" style:font-weight-asian="bold" style:font-weight-complex="bold"/>
    </style:style>
    <style:style style:name="P31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Arial" fo:font-weight="normal" style:font-weight-asian="normal" style:font-weight-complex="normal"/>
    </style:style>
    <style:style style:name="P32" style:family="paragraph" style:parent-style-name="Preformatted_20_Text">
      <style:paragraph-properties fo:margin-top="0in" fo:margin-bottom="0.1965in" style:contextual-spacing="false" fo:line-height="115%" style:writing-mode="lr-tb"/>
      <style:text-properties fo:font-weight="bold" officeooo:paragraph-rsid="001b6518" style:font-weight-asian="bold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15%" style:writing-mode="lr-tb"/>
      <style:text-properties fo:font-weight="bold" style:font-weight-asian="bold" style:font-weight-complex="bold"/>
    </style:style>
    <style:style style:name="P34" style:family="paragraph" style:parent-style-name="Heading_20_3">
      <style:text-properties style:font-name="Arial" fo:font-weight="normal" style:font-weight-asian="normal" style:font-weight-complex="normal"/>
    </style:style>
    <style:style style:name="P35" style:family="paragraph" style:parent-style-name="Text_20_body" style:list-style-name="L7"/>
    <style:style style:name="P36" style:family="paragraph" style:parent-style-name="Heading_20_2">
      <style:text-properties style:font-name="Arial" fo:font-weight="bold" style:font-weight-asian="bold" style:font-weight-complex="bold"/>
    </style:style>
    <style:style style:name="P37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Arial"/>
    </style:style>
    <style:style style:name="P38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39" style:family="paragraph" style:parent-style-name="Text_20_body" style:list-style-name="L8">
      <style:text-properties style:font-name="Arial"/>
    </style:style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Preformatted_20_Text">
      <style:paragraph-properties fo:margin-top="0in" fo:margin-bottom="0.1965in" style:contextual-spacing="false" fo:line-height="115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c47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officeooo:rsid="001329ae"/>
    </style:style>
    <style:style style:name="T6" style:family="text">
      <style:text-properties officeooo:rsid="00137051"/>
    </style:style>
    <style:style style:name="T7" style:family="text">
      <style:text-properties style:font-name="Arial"/>
    </style:style>
    <style:style style:name="T8" style:family="text">
      <style:text-properties fo:font-weight="bold" officeooo:rsid="00137051" style:font-weight-asian="bold" style:font-weight-complex="bold"/>
    </style:style>
    <style:style style:name="T9" style:family="text">
      <style:text-properties style:font-name="Arial" fo:font-weight="bold" officeooo:rsid="0016df18" style:font-weight-asian="bold" style:font-weight-complex="bold"/>
    </style:style>
    <style:style style:name="T10" style:family="text">
      <style:text-properties style:font-name="Arial" fo:font-weight="normal" officeooo:rsid="0015d03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:Sameen Shahzad</text:span></text:p>
      <text:p text:style-name="P1" loext:marker-style-name="T1"><text:span text:style-name="T1">Date:12/2/26</text:span></text:p>
      <text:h text:style-name="P2" text:outline-level="4"><text:tab/><text:tab/><text:tab/> <text:s text:c="4"/>Day<text:span text:style-name="T2">3</text:span> FastAPI Training Plan </text:h>
      <text:h text:style-name="P3" text:outline-level="1"><text:tab/><text:tab/><text:tab/>Database + CRUD + Async </text:h>
      <text:p text:style-name="P4"/>
      <text:p text:style-name="P5">What is ORM?</text:p>
      <text:p text:style-name="P6"><text:span text:style-name="Strong_20_Emphasis"><text:span text:style-name="T3">ORM (Object–Relational Mapping)</text:span></text:span><text:span text:style-name="T4"> is a technique that allows you to interact with a </text:span><text:span text:style-name="Strong_20_Emphasis"><text:span text:style-name="T4">relational database using programming language objects (like Python classes)</text:span></text:span><text:span text:style-name="T4"> instead of writing raw SQL queries.</text:span></text:p>
      <text:p text:style-name="P7"><text:s/><text:span text:style-name="T5">Database undersatnd SQL such as</text:span></text:p>
      <text:p text:style-name="P8">SELECT * FROM tasks;</text:p>
      <text:p text:style-name="P8">INSERT INTO tasks VALUES (...);</text:p>
      <text:p text:style-name="P7">while python interpreter understand python code .</text:p>
      <text:p text:style-name="P7">So to connect python obj to SQL table we use ORM techniques(not a tool or software).</text:p>
      <text:p text:style-name="P7">ORM = Object Relational Mapper</text:p>
      <text:p text:style-name="P7">It converts:</text:p>
      <text:list text:style-name="L1">
        <text:list-item>
          <text:p text:style-name="P9">Database Tables → Python Classes</text:p>
        </text:list-item>
        <text:list-item>
          <text:p text:style-name="P9"><text:s/>Rows → Python Objects</text:p>
        </text:list-item>
        <text:list-item>
          <text:p text:style-name="P9"><text:s/>SQL Queries → Python Code</text:p>
        </text:list-item>
      </text:list>
      <text:p text:style-name="P4">Instead of writing SQL manually like this </text:p>
      <text:p text:style-name="P10">cursor.execute("SELECT * FROM task WHERE id = 1")</text:p>
      <text:p text:style-name="P4">, you use Python obj</text:p>
      <text:p text:style-name="P10">user = session.query(task).filter(task.id == 1).first()</text:p>
      <text:p text:style-name="P11">What is SQLAlchemy?</text:p>
      <text:p text:style-name="P4">SQLAlchemy is the most popular ORM <text:s/><text:span text:style-name="T6">lib </text:span><text:s/>in Python.</text:p>
      <text:p text:style-name="P12">Two main parts:</text:p>
      <text:list text:style-name="L2">
        <text:list-item>
          <text:p text:style-name="P13"><text:span text:style-name="Strong_20_Emphasis"><text:span text:style-name="T7">Core (Optional)</text:span></text:span><text:span text:style-name="T7"> – write raw SQL in Python.</text:span></text:p>
        </text:list-item>
        <text:list-item>
          <text:p text:style-name="P13"><text:span text:style-name="Strong_20_Emphasis"><text:span text:style-name="T7">ORM</text:span></text:span><text:span text:style-name="T7"> – use Python classes instead of raw SQL.</text:span></text:p>
        </text:list-item>
      </text:list>
      <text:p text:style-name="P12"/>
      <text:p text:style-name="P10">Core component:</text:p>
      <text:p text:style-name="P10"><text:soft-page-break/>1. Engine</text:p>
      <text:p text:style-name="P4">Connects Python to the database.</text:p>
      <text:p text:style-name="Text_20_body"><text:span text:style-name="Source_20_Text"><text:span text:style-name="T7">engine = create_engine(DATABASE_URL)</text:span></text:span></text:p>
      <text:p text:style-name="P4"><text:span text:style-name="T8">2</text:span><text:span text:style-name="T1"> Model (Table Representation</text:span><text:span text:style-name="T8">)</text:span></text:p>
      <text:p text:style-name="P4"><text:span text:style-name="T6">c</text:span>lass Task(Base):</text:p>
      <text:p text:style-name="P4"><text:s text:c="4"/>__tablename__ = "tasks"</text:p>
      <text:p text:style-name="P4"/>
      <text:p text:style-name="P4"><text:s text:c="4"/>id = Column(Integer, primary_key=True, index=True)</text:p>
      <text:p text:style-name="P4"><text:s text:c="4"/>title = Column(String, index=True)</text:p>
      <text:p text:style-name="P4"><text:s text:c="4"/>completed = Column(Boolean, default=False)</text:p>
      <text:p text:style-name="P4">This creates a table:</text:p>
      <text:p text:style-name="P4">| id | title | completed |</text:p>
      <text:p text:style-name="P10"><text:span text:style-name="T6">3</text:span> Session</text:p>
      <text:p text:style-name="P14">Used to talk to DB.Used to send queries and transactions to the database.</text:p>
      <text:p text:style-name="P4">SessionLocal = sessionmaker(bind=engine)</text:p>
      <text:p text:style-name="P4">Session = like opening a conversation with database. </text:p>
      <text:p text:style-name="Text_20_body"><text:span text:style-name="Source_20_Text"><text:span text:style-name="T9">4</text:span></text:span><text:span text:style-name="Source_20_Text"><text:span text:style-name="T3">Base</text:span></text:span><text:span text:style-name="T7"> – all ORM classes inherit this. </text:span></text:p>
      <text:p text:style-name="P11">What is PostgreSQL?</text:p>
      <text:p text:style-name="P4">PostgreSQL is a powerful open-source relational database.</text:p>
      <text:p text:style-name="P4">It is:</text:p>
      <text:list text:style-name="L3">
        <text:list-item>
          <text:p text:style-name="P15">Used in production systems</text:p>
        </text:list-item>
        <text:list-item>
          <text:p text:style-name="P15">Fast</text:p>
        </text:list-item>
        <text:list-item>
          <text:p text:style-name="P15">Secure</text:p>
        </text:list-item>
        <text:list-item>
          <text:p text:style-name="P15">Scalable</text:p>
        </text:list-item>
      </text:list>
      <text:p text:style-name="P10">Why not SQLite?</text:p>
      <text:p text:style-name="P4"><text:span text:style-name="T1">SQLite</text:span>:</text:p>
      <text:list text:style-name="L4">
        <text:list-item>
          <text:p text:style-name="P16">Simple</text:p>
        </text:list-item>
        <text:list-item>
          <text:p text:style-name="P16">Good for testing</text:p>
        </text:list-item>
      </text:list>
      <text:p text:style-name="P4"><text:span text:style-name="T1">PostgreSQL</text:span>:</text:p>
      <text:list text:style-name="L5">
        <text:list-item>
          <text:p text:style-name="P17"><text:soft-page-break/>Production ready</text:p>
        </text:list-item>
        <text:list-item>
          <text:p text:style-name="P17">Handles many users</text:p>
        </text:list-item>
        <text:list-item>
          <text:p text:style-name="P17">Better performance</text:p>
          <text:p text:style-name="P18"><text:span text:style-name="Strong_20_Emphasis"><text:span text:style-name="T7">Connection string format:</text:span></text:span></text:p>
        </text:list-item>
      </text:list>
      <text:p text:style-name="P19"><text:span text:style-name="Source_20_Text"><text:span text:style-name="T7">postgresql://username:password@host:port/dbname</text:span></text:span></text:p>
      <text:p text:style-name="Text_20_body"><text:span text:style-name="Strong_20_Emphasis"><text:span text:style-name="T7">Example:</text:span></text:span></text:p>
      <text:p text:style-name="P20"><text:span text:style-name="Source_20_Text"><text:span text:style-name="T7">postgresql://postgres:mypassword@localhost:5432/taskdb</text:span></text:span></text:p>
      <text:list text:continue-numbering="true" text:style-name="L5">
        <text:list-item>
          <text:p text:style-name="P17"/>
        </text:list-item>
      </text:list>
      <text:h text:style-name="P21" text:outline-level="4">Connecting DB with FastAPI :</text:h>
      <text:p text:style-name="P22"><text:span text:style-name="Source_20_Text"><text:span text:style-name="T10">Two main things:</text:span></text:span></text:p>
      <text:p text:style-name="P22"><text:span text:style-name="Source_20_Text"><text:span text:style-name="T7">-</text:span></text:span><text:span text:style-name="Source_20_Text"><text:span text:style-name="T4">sqlalchemy</text:span></text:span><text:span text:style-name="T4"> </text:span><text:span text:style-name="T7">→ ORM</text:span></text:p>
      <text:p text:style-name="P23">ORM (like <text:span text:style-name="Strong_20_Emphasis">SQLAlchemy</text:span>) is a <text:span text:style-name="Strong_20_Emphasis">tool that converts your Python objects into SQL queries</text:span>.</text:p>
      <text:p text:style-name="P22"><text:span text:style-name="Source_20_Text"><text:span text:style-name="T7">-</text:span></text:span><text:span text:style-name="Source_20_Text"><text:span text:style-name="T4">psycopg2-binary</text:span></text:span><text:span text:style-name="T4"> </text:span><text:span text:style-name="T7">→ PostgreSQL driver (connector)</text:span></text:p>
      <text:p text:style-name="P23">A <text:span text:style-name="Strong_20_Emphasis">database driver</text:span> is like a <text:span text:style-name="Strong_20_Emphasis">translator/connector</text:span> between Python and the actual database (PostgreSQL, MySQL, etc.).</text:p>
      <text:list text:style-name="L6">
        <text:list-item>
          <text:p text:style-name="P24">Examples for PostgreSQL: <text:span text:style-name="Source_20_Text">psycopg2</text:span>, <text:span text:style-name="Source_20_Text">asyncpg</text:span>.</text:p>
        </text:list-item>
        <text:list-item>
          <text:p text:style-name="P24">Examples for MySQL: <text:span text:style-name="Source_20_Text">mysqlclient</text:span>, <text:span text:style-name="Source_20_Text">pymysql</text:span>.</text:p>
        </text:list-item>
      </text:list>
      <text:p text:style-name="P23"/>
      <text:p text:style-name="P10"><text:s/>Install Required Packages </text:p>
      <text:p text:style-name="P25">pip install fastapi uvicorn sqlalchemy psycopg2-binary</text:p>
      <text:p text:style-name="P10"/>
      <text:p text:style-name="P26"><text:span text:style-name="Source_20_Text"><text:span text:style-name="T7"/></text:span></text:p>
      <text:p text:style-name="P27"><text:span text:style-name="Source_20_Text"><text:span text:style-name="T4">from sqlalchemy import create_engine</text:span></text:span></text:p>
      <text:p text:style-name="P28"><text:span text:style-name="Source_20_Text"><text:span text:style-name="T4">from sqlalchemy.orm import sessionmaker,declarative_base</text:span></text:span></text:p>
      <text:p text:style-name="P29"/>
      <text:p text:style-name="P30"><text:span text:style-name="Source_20_Text"><text:span text:style-name="T4">DATABASE_URL = "postgresql://username:password@localhost/fastapi_db"</text:span></text:span></text:p>
      <text:p text:style-name="P31"/>
      <text:p text:style-name="P32"><text:span text:style-name="Source_20_Text"><text:span text:style-name="T4">engine = create_engine(DATABASE_URL)</text:span></text:span></text:p>
      <text:p text:style-name="P32"><text:span text:style-name="Source_20_Text"><text:span text:style-name="T4">SessionLocal = sessionmaker(autocommit=False, autoflush=False, bind=engine)</text:span></text:span></text:p>
      <text:p text:style-name="P33"><text:span text:style-name="Source_20_Text"><text:span text:style-name="T7">Base = declarative_base()</text:span></text:span></text:p>
      <text:h text:style-name="P34" text:outline-level="3"><text:soft-page-break/>Explanation</text:h>
      <text:list text:style-name="L7">
        <text:list-item>
          <text:p text:style-name="P35"><text:span text:style-name="Source_20_Text"><text:span text:style-name="T7">create_engine()</text:span></text:span><text:span text:style-name="T7"> → Connects SQLAlchemy to PostgreSQL</text:span></text:p>
        </text:list-item>
        <text:list-item>
          <text:p text:style-name="P35"><text:span text:style-name="Source_20_Text"><text:span text:style-name="T7">SessionLocal</text:span></text:span><text:span text:style-name="T7"> → Creates database sessions</text:span></text:p>
        </text:list-item>
        <text:list-item>
          <text:p text:style-name="P35"><text:span text:style-name="Source_20_Text"><text:span text:style-name="T7">Base</text:span></text:span><text:span text:style-name="T7"> → Parent class for all ORM models</text:span></text:p>
        </text:list-item>
      </text:list>
      <text:p text:style-name="Text_20_body"><text:span text:style-name="T7">Think of </text:span><text:span text:style-name="Source_20_Text"><text:span text:style-name="T7">Base</text:span></text:span><text:span text:style-name="T7"> as foundation of all tables.</text:span></text:p>
      <text:h text:style-name="Heading_20_1" text:outline-level="1"><text:span text:style-name="Source_20_Text"><text:span text:style-name="T7"/></text:span></text:h>
      <text:h text:style-name="P36" text:outline-level="2">What is Dependency Injection?</text:h>
      <text:p text:style-name="P4">Instead of creating DB session manually in every function,<text:line-break/>FastAPI provides it automatically.</text:p>
      <text:p text:style-name="P4">Example:</text:p>
      <text:p text:style-name="P19"><text:span text:style-name="Source_20_Text"><text:span text:style-name="T7">from fastapi import Depends</text:span></text:span></text:p>
      <text:p text:style-name="P37"/>
      <text:p text:style-name="P38"><text:span text:style-name="Source_20_Text"><text:span text:style-name="T7">def get_db():</text:span></text:span></text:p>
      <text:p text:style-name="P38"><text:span text:style-name="Source_20_Text"><text:span text:style-name="T7"><text:s text:c="4"/>db = SessionLocal()</text:span></text:span></text:p>
      <text:p text:style-name="P38"><text:span text:style-name="Source_20_Text"><text:span text:style-name="T7"><text:s text:c="4"/>try:</text:span></text:span></text:p>
      <text:p text:style-name="P38"><text:span text:style-name="Source_20_Text"><text:span text:style-name="T7"><text:s text:c="8"/>yield db</text:span></text:span></text:p>
      <text:p text:style-name="P38"><text:span text:style-name="Source_20_Text"><text:span text:style-name="T7"><text:s text:c="4"/>finally:</text:span></text:span></text:p>
      <text:p text:style-name="P38"><text:span text:style-name="Source_20_Text"><text:span text:style-name="T7"><text:s text:c="8"/>db.close()</text:span></text:span></text:p>
      <text:p text:style-name="P4">Use it like:</text:p>
      <text:p text:style-name="P19"><text:span text:style-name="Source_20_Text"><text:span text:style-name="T7">@app.post("/tasks")</text:span></text:span></text:p>
      <text:p text:style-name="P38"><text:span text:style-name="Source_20_Text"><text:span text:style-name="T7">def create_task(task: TaskCreate, db: Session = Depends(get_db)):</text:span></text:span></text:p>
      <text:p text:style-name="P4">FastAPI:</text:p>
      <text:list text:style-name="L8">
        <text:list-item>
          <text:p text:style-name="P39">Opens DB session</text:p>
        </text:list-item>
        <text:list-item>
          <text:p text:style-name="P39">Injects it</text:p>
        </text:list-item>
        <text:list-item>
          <text:p text:style-name="P39">Closes it automatically</text:p>
        </text:list-item>
      </text:list>
      <text:p text:style-name="P4"/>
      <text:p text:style-name="P4"/>
      <text:h text:style-name="Heading_20_2" text:outline-level="2"><text:span text:style-name="Strong_20_Emphasis"><text:span text:style-name="T7">. CRUD Operations</text:span></text:span></text:h>
      <text:p text:style-name="Text_20_body"><text:span text:style-name="T7">CRUD = </text:span><text:span text:style-name="Strong_20_Emphasis"><text:span text:style-name="T7">Create, Read, Update, Delete</text:span></text:span></text:p>
      <text:p text:style-name="Text_20_body"><text:soft-page-break/><text:span text:style-name="Strong_20_Emphasis"><text:span text:style-name="T7">1. Create Task</text:span></text:span></text:p>
      <text:p text:style-name="P19"><text:span text:style-name="Source_20_Text"><text:span text:style-name="T7">def create_task(db: Session, title: str):</text:span></text:span></text:p>
      <text:p text:style-name="P38"><text:span text:style-name="Source_20_Text"><text:span text:style-name="T7"><text:s text:c="4"/>new_task = Task(title=title)</text:span></text:span></text:p>
      <text:p text:style-name="P38"><text:span text:style-name="Source_20_Text"><text:span text:style-name="T7"><text:s text:c="4"/>db.add(new_task)</text:span></text:span></text:p>
      <text:p text:style-name="P38"><text:span text:style-name="Source_20_Text"><text:span text:style-name="T7"><text:s text:c="4"/>db.commit()</text:span></text:span></text:p>
      <text:p text:style-name="P38"><text:span text:style-name="Source_20_Text"><text:span text:style-name="T7"><text:s text:c="4"/>db.refresh(new_task)</text:span></text:span></text:p>
      <text:p text:style-name="P38"><text:span text:style-name="Source_20_Text"><text:span text:style-name="T7"><text:s text:c="4"/>return new_task</text:span></text:span></text:p>
      <text:p text:style-name="Text_20_body"><text:span text:style-name="Strong_20_Emphasis"><text:span text:style-name="T7">2. Get All Tasks</text:span></text:span></text:p>
      <text:p text:style-name="P19"><text:span text:style-name="Source_20_Text"><text:span text:style-name="T7">def get_tasks(db: Session):</text:span></text:span></text:p>
      <text:p text:style-name="P38"><text:span text:style-name="Source_20_Text"><text:span text:style-name="T7"><text:s text:c="4"/>return db.query(Task).all()</text:span></text:span></text:p>
      <text:p text:style-name="Text_20_body"><text:span text:style-name="Strong_20_Emphasis"><text:span text:style-name="T7">3. Update Task</text:span></text:span></text:p>
      <text:p text:style-name="P4">def update_task(db: Session, task_id: int, title: str):</text:p>
      <text:p text:style-name="P4"><text:s text:c="4"/>task = db.query(Task).filter(Task.id == task_id).first()</text:p>
      <text:p text:style-name="P4"><text:s text:c="4"/>task.title = title</text:p>
      <text:p text:style-name="P4"><text:s text:c="4"/>db.commit()</text:p>
      <text:p text:style-name="P4"><text:s text:c="4"/>db.refresh(task)</text:p>
      <text:p text:style-name="P4"><text:s text:c="4"/>return task</text:p>
      <text:p text:style-name="P4">4. Delete Task</text:p>
      <text:p text:style-name="P4"/>
      <text:p text:style-name="P4">def delete_task(db: Session, task_id: int):</text:p>
      <text:p text:style-name="P4"><text:s text:c="4"/>task = db.query(Task).filter(Task.id == task_id).first()</text:p>
      <text:p text:style-name="P4"><text:s text:c="4"/>db.delete(task)</text:p>
      <text:p text:style-name="P4"><text:s text:c="4"/>db.commit()</text:p>
      <text:p text:style-name="P4"><text:s text:c="4"/>return {"ok": True}</text:p>
      <text:p text:style-name="P4"/>
      <text:p text:style-name="P4"/>
      <text:h text:style-name="Heading_20_2" text:outline-level="2"><text:span text:style-name="Strong_20_Emphasis"><text:span text:style-name="T7">Async vs Sync Basics</text:span></text:span></text:h>
      <text:list text:style-name="L9">
        <text:list-item>
          <text:p text:style-name="P40"><text:span text:style-name="Strong_20_Emphasis"><text:span text:style-name="T7">Sync</text:span></text:span><text:span text:style-name="T7"> (Synchronous): Code executes </text:span><text:span text:style-name="Strong_20_Emphasis"><text:span text:style-name="T7">line by line</text:span></text:span><text:span text:style-name="T7">.</text:span></text:p>
        </text:list-item>
        <text:list-item>
          <text:p text:style-name="P40"><text:span text:style-name="Strong_20_Emphasis"><text:span text:style-name="T7">Async</text:span></text:span><text:span text:style-name="T7"> (Asynchronous): Code can </text:span><text:span text:style-name="Strong_20_Emphasis"><text:span text:style-name="T7">wait for IO (DB, API) without blocking</text:span></text:span><text:span text:style-name="T7">.</text:span></text:p>
        </text:list-item>
      </text:list>
      <text:p text:style-name="Text_20_body"><text:span text:style-name="Strong_20_Emphasis"><text:span text:style-name="T7">In FastAPI:</text:span></text:span></text:p>
      <text:list text:style-name="L10">
        <text:list-item>
          <text:p text:style-name="P41"><text:soft-page-break/><text:span text:style-name="T7">SQLAlchemy ORM is </text:span><text:span text:style-name="Strong_20_Emphasis"><text:span text:style-name="T7">sync</text:span></text:span><text:span text:style-name="T7"> by default.</text:span></text:p>
        </text:list-item>
        <text:list-item>
          <text:p text:style-name="P41"><text:span text:style-name="T7">Use </text:span><text:span text:style-name="Source_20_Text"><text:span text:style-name="T7">async</text:span></text:span><text:span text:style-name="T7"> only with </text:span><text:span text:style-name="Strong_20_Emphasis"><text:span text:style-name="T7">async ORM</text:span></text:span><text:span text:style-name="T7"> like </text:span><text:span text:style-name="Source_20_Text"><text:span text:style-name="T7">SQLModel</text:span></text:span><text:span text:style-name="T7"> or </text:span><text:span text:style-name="Source_20_Text"><text:span text:style-name="T7">encode/databases</text:span></text:span><text:span text:style-name="T7">.</text:span></text:p>
        </text:list-item>
      </text:list>
      <text:p text:style-name="Text_20_body"><text:span text:style-name="Strong_20_Emphasis"><text:span text:style-name="T7">Example sync route:</text:span></text:span></text:p>
      <text:p text:style-name="P19"><text:span text:style-name="Source_20_Text"><text:span text:style-name="T7">@app.get("/tasks")</text:span></text:span></text:p>
      <text:p text:style-name="P38"><text:span text:style-name="Source_20_Text"><text:span text:style-name="T7">def get_tasks(db: Session = Depends(get_db)):</text:span></text:span></text:p>
      <text:p text:style-name="P38"><text:span text:style-name="Source_20_Text"><text:span text:style-name="T7"><text:s text:c="4"/>return db.query(Task).all()</text:span></text:span></text:p>
      <text:p text:style-name="Text_20_body"><text:span text:style-name="Strong_20_Emphasis"><text:span text:style-name="T7">Async version (requires async DB library):</text:span></text:span></text:p>
      <text:p text:style-name="P19"><text:span text:style-name="Source_20_Text"><text:span text:style-name="T7">@app.get("/tasks")</text:span></text:span></text:p>
      <text:p text:style-name="P38"><text:span text:style-name="Source_20_Text"><text:span text:style-name="T7">async def get_tasks():</text:span></text:span></text:p>
      <text:p text:style-name="P38"><text:span text:style-name="Source_20_Text"><text:span text:style-name="T7"><text:s text:c="4"/>tasks = await fetch_tasks_from_db()</text:span></text:span></text:p>
      <text:p text:style-name="P42"><text:span text:style-name="Source_20_Text"><text:span text:style-name="T7"><text:s text:c="4"/>return tasks</text:span></text:span></text:p>
      <text:p text:style-name="P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22:00:51.180880900</meta:creation-date>
    <meta:editing-duration>PT1H9M47S</meta:editing-duration>
    <meta:editing-cycles>3</meta:editing-cycles>
    <meta:generator>LibreOffice/25.8.3.2$Windows_X86_64 LibreOffice_project/8ca8d55c161d602844f5428fa4b58097424e324e</meta:generator>
    <dc:date>2026-02-13T23:10:34.395983900</dc:date>
    <meta:document-statistic meta:table-count="0" meta:image-count="0" meta:object-count="0" meta:page-count="6" meta:paragraph-count="140" meta:word-count="611" meta:character-count="4446" meta:non-whitespace-character-count="3861"/>
  </office:meta>
</office:document-meta>
</file>