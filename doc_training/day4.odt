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/>
    </style:style>
    <style:style style:name="P2" style:family="paragraph" style:parent-style-name="Standard">
      <style:paragraph-properties fo:margin-left="0in" fo:margin-right="0in" fo:orphans="2" fo:widows="2" fo:text-indent="0in" style:auto-text-indent="false" style:writing-mode="lr-tb"/>
      <style:text-properties officeooo:paragraph-rsid="001078d5"/>
    </style:style>
    <style:style style:name="P3" style:family="paragraph" style:parent-style-name="Standard">
      <style:paragraph-properties fo:margin-left="0in" fo:margin-right="0in" fo:orphans="2" fo:widows="2" fo:text-indent="0in" style:auto-text-indent="false" style:writing-mode="lr-tb"/>
      <style:text-properties fo:color="#000000" loext:opacity="100%" style:font-name="Arial" officeooo:paragraph-rsid="001078d5"/>
    </style:style>
    <style:style style:name="P4" style:family="paragraph" style:parent-style-name="Heading_20_1">
      <style:paragraph-properties fo:margin-top="0in" fo:margin-bottom="0in" style:contextual-spacing="fals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color="#cccccc" loext:opacity="100%" style:font-name="Consolas" fo:font-size="10.5pt" fo:font-weight="normal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13" style:family="paragraph" style:parent-style-name="Standard">
      <style:paragraph-properties fo:margin-top="0in" fo:margin-bottom="0.1965in" style:contextual-spacing="false" style:line-height-at-least="0.198in"/>
    </style:style>
    <style:style style:name="P14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000000" loext:opacity="100%" style:font-name="Arial"/>
    </style:style>
    <style:style style:name="T2" style:family="text">
      <style:text-properties fo:font-variant="normal" fo:text-transform="none" fo:color="#000000" loext:opacity="100%" style:font-name="Arial" fo:letter-spacing="normal" fo:font-style="normal" fo:font-weight="bold" style:font-weight-asian="bold" style:font-weight-complex="bold"/>
    </style:style>
    <style:style style:name="T3" style:family="text">
      <style:text-properties fo:color="#000000" loext:opacity="100%" style:font-name="Arial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bold" officeooo:rsid="001078d5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font-size="20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000000" loext:opacity="100%" style:font-name="Arial" fo:font-size="20pt" fo:letter-spacing="normal" fo:font-style="normal" fo:font-weight="normal" officeooo:rsid="001078d5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586c0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c586c0" loext:opacity="100%" style:font-name="Consolas" fo:font-size="10.5pt" fo:font-weight="normal"/>
    </style:style>
    <style:style style:name="T21" style:family="text">
      <style:text-properties fo:color="#ce9178" loext:opacity="100%" style:font-name="Consolas" fo:font-size="10.5pt" fo:font-weight="normal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fo:color="#6a9955" loext:opacity="100%" style:font-name="Consolas" fo:font-size="10.5pt" fo:font-weight="normal"/>
    </style:style>
    <style:style style:name="fr1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<text:line-break/></text:span><text:span text:style-name="T2">Name:Sameen Shahzad</text:span><text:span text:style-name="T3"><text:line-break/></text:span><text:span text:style-name="T2">Date:1</text:span><text:span text:style-name="T4">5</text:span><text:span text:style-name="T2">/2/26</text:span><text:span text:style-name="T1"><text:line-break/><text:tab/><text:tab/><text:tab/><text:tab/></text:span><text:span text:style-name="T5">Day</text:span><text:span text:style-name="T6">4</text:span><text:span text:style-name="T5"> FastAPI Training Plan</text:span><text:span text:style-name="T1"><text:line-break/></text:span></text:p>
      <text:p text:style-name="P3"/>
      <text:p text:style-name="P2"><text:span text:style-name="T1"><draw:frame draw:style-name="fr1" draw:name="Frame1" text:anchor-type="as-char" draw:z-index="0"><draw:text-box fo:min-height="0in" fo:min-width="0in"><text:h text:style-name="P4" text:outline-level="1">Mini Project Management System </text:h></draw:text-box></draw:frame></text:span><text:span text:style-name="T1"><text:line-break/></text:span></text:p>
      <text:p text:style-name="P5"><text:span text:style-name="T7">Repository</text:span>: [https://github.com/SameenShahzad-rtc/backend_phase_1](https://github.com/SameenShahzad-rtc/backend_phase_1) <text:s/></text:p>
      <text:p text:style-name="P5"/>
      <text:p text:style-name="P5"/>
      <text:p text:style-name="P5"><text:span text:style-name="T7">Project Overview</text:span> <text:s/></text:p>
      <text:p text:style-name="P5"/>
      <text:p text:style-name="P5">The system allows users to:</text:p>
      <text:p text:style-name="P5">- Register and log in </text:p>
      <text:p text:style-name="P5">- Create, view, and delete their own projects</text:p>
      <text:p text:style-name="P5">- Add, view, update, and delete tasks within those projects</text:p>
      <text:p text:style-name="P5">- Track task status (pending, in_progress, completed)</text:p>
      <text:p text:style-name="P5"/>
      <text:p text:style-name="P6"/>
      <text:p text:style-name="P6">Key Features Implemented</text:p>
      <text:p text:style-name="P5"/>
      <text:p text:style-name="P5"><text:s/><text:span text:style-name="T7">User Module</text:span></text:p>
      <text:p text:style-name="P5">- POST /users/register → Create a new user (username, email, password)</text:p>
      <text:p text:style-name="P5">- POST /users/login→ Authenticate user</text:p>
      <text:p text:style-name="P5"/>
      <text:p text:style-name="P7"><text:span text:style-name="T8">from</text:span> <text:span text:style-name="T9">fastapi</text:span> <text:span text:style-name="T8">import</text:span> <text:span text:style-name="T9">APIRouter</text:span>, <text:span text:style-name="T10">Depends</text:span>, <text:span text:style-name="T9">HTTPException</text:span>,<text:span text:style-name="T9">status</text:span></text:p>
      <text:p text:style-name="P8"><text:span text:style-name="T8">from</text:span> <text:span text:style-name="T9">sqlalchemy</text:span>.<text:span text:style-name="T9">orm</text:span> <text:span text:style-name="T8">import</text:span> <text:span text:style-name="T9">Session</text:span></text:p>
      <text:p text:style-name="P8"><text:span text:style-name="T8">from</text:span> <text:span text:style-name="T9">database</text:span> <text:span text:style-name="T8">import</text:span> <text:span text:style-name="T10">get_db</text:span></text:p>
      <text:p text:style-name="P8"><text:span text:style-name="T8">from</text:span> <text:span text:style-name="T9">models</text:span>.<text:span text:style-name="T9">user</text:span> <text:span text:style-name="T8">import</text:span> <text:span text:style-name="T9">User</text:span></text:p>
      <text:p text:style-name="P8"><text:span text:style-name="T8">from</text:span> <text:span text:style-name="T9">schemas</text:span>.<text:span text:style-name="T9">user_schema</text:span> <text:span text:style-name="T8">import</text:span> <text:span text:style-name="T9">UserRegister</text:span>, <text:span text:style-name="T9">UserLogin</text:span>, <text:span text:style-name="T9">Userout</text:span>,<text:span text:style-name="T9">LoginResponse</text:span></text:p>
      <text:p text:style-name="P8"><text:span text:style-name="T8">from</text:span> <text:span text:style-name="T9">typing</text:span> <text:span text:style-name="T8">import</text:span> <text:span text:style-name="T9">Dict</text:span></text:p>
      <text:p text:style-name="P9"/>
      <text:p text:style-name="P8"><text:span text:style-name="T11">r</text:span><text:span text:style-name="T12">=</text:span><text:span text:style-name="T9">APIRouter</text:span>()</text:p>
      <text:p text:style-name="P9"/>
      <text:p text:style-name="P8"><text:span text:style-name="T10">@</text:span><text:span text:style-name="T11">r</text:span><text:span text:style-name="T10">.post</text:span>(<text:span text:style-name="T13">'/register'</text:span>,<text:span text:style-name="T11">response_model</text:span><text:span text:style-name="T12">=</text:span><text:span text:style-name="T9">Userout</text:span>)</text:p>
      <text:p text:style-name="P8"><text:span text:style-name="T14">def</text:span> <text:span text:style-name="T10">userReg</text:span>(<text:span text:style-name="T11">u</text:span>:<text:span text:style-name="T9">UserRegister</text:span>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d_user</text:span><text:span text:style-name="T16">=</text:span><text:span text:style-name="T15">db</text:span><text:span text:style-name="T17">.</text:span><text:span text:style-name="T18">query</text:span><text:span text:style-name="T17">(</text:span><text:span text:style-name="T19">User</text:span><text:span text:style-name="T17">).</text:span><text:span text:style-name="T18">filter</text:span><text:span text:style-name="T17">(</text:span><text:span text:style-name="T19">User</text:span><text:span text:style-name="T17">.</text:span><text:span text:style-name="T15">email</text:span><text:span text:style-name="T18">==</text:span><text:span text:style-name="T15">u</text:span><text:span text:style-name="T17">.</text:span><text:span text:style-name="T15">email</text:span><text:span text:style-name="T17">).</text:span><text:span text:style-name="T18">first</text:span><text:span text:style-name="T17">()</text:span></text:p>
      <text:p text:style-name="P10">    <text:span text:style-name="T20">if</text:span><text:span text:style-name="T17"> </text:span><text:span text:style-name="T15">d_user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208_ALREADY_REPORTED</text:span><text:span text:style-name="T17">,</text:span><text:span text:style-name="T15">detail</text:span><text:span text:style-name="T16">=</text:span><text:span text:style-name="T21">"user already register"</text:span><text:span text:style-name="T17">)</text:span></text:p>
      <text:p text:style-name="P10">    <text:span text:style-name="T15">n_user</text:span><text:span text:style-name="T17"> </text:span><text:span text:style-name="T16">=</text:span><text:span text:style-name="T17"> </text:span><text:span text:style-name="T19">User</text:span><text:span text:style-name="T17">(</text:span></text:p>
      <text:p text:style-name="P10">        <text:span text:style-name="T15">username</text:span><text:span text:style-name="T16">=</text:span><text:span text:style-name="T15">u</text:span><text:span text:style-name="T17">.</text:span><text:span text:style-name="T15">username</text:span><text:span text:style-name="T17">,</text:span></text:p>
      <text:p text:style-name="P10">        <text:span text:style-name="T15">email</text:span><text:span text:style-name="T16">=</text:span><text:span text:style-name="T15">u</text:span><text:span text:style-name="T17">.</text:span><text:span text:style-name="T15">email</text:span><text:span text:style-name="T17">,</text:span></text:p>
      <text:p text:style-name="P10"><text:soft-page-break/>        <text:span text:style-name="T15">password</text:span><text:span text:style-name="T16">=</text:span><text:span text:style-name="T15">u</text:span><text:span text:style-name="T17">.</text:span><text:span text:style-name="T15">password</text:span></text:p>
      <text:p text:style-name="P10">    <text:span text:style-name="T17">)</text:span></text:p>
      <text:p text:style-name="P10">    <text:span text:style-name="T15">db</text:span><text:span text:style-name="T17">.</text:span><text:span text:style-name="T18">add</text:span><text:span text:style-name="T17">(</text:span><text:span text:style-name="T15">n_user</text:span><text:span text:style-name="T17">)</text:span></text:p>
      <text:p text:style-name="P10">    <text:span text:style-name="T15">db</text:span><text:span text:style-name="T17">.</text:span><text:span text:style-name="T18">commit</text:span><text:span text:style-name="T17">()</text:span></text:p>
      <text:p text:style-name="P10">    <text:span text:style-name="T15">db</text:span><text:span text:style-name="T17">.</text:span><text:span text:style-name="T18">refresh</text:span><text:span text:style-name="T17">(</text:span><text:span text:style-name="T15">n_user</text:span><text:span text:style-name="T17">)</text:span></text:p>
      <text:p text:style-name="P10">    <text:span text:style-name="T20">return</text:span><text:span text:style-name="T17"> </text:span><text:span text:style-name="T15">n_user</text:span></text:p>
      <text:p text:style-name="P9"/>
      <text:p text:style-name="P11"># Users can login</text:p>
      <text:p text:style-name="P9"/>
      <text:p text:style-name="P8"><text:span text:style-name="T10">@</text:span><text:span text:style-name="T11">r</text:span><text:span text:style-name="T10">.post</text:span>(<text:span text:style-name="T13">'/login'</text:span>,<text:span text:style-name="T11">response_model</text:span><text:span text:style-name="T12">=</text:span><text:span text:style-name="T9">LoginResponse</text:span>)</text:p>
      <text:p text:style-name="P8"><text:span text:style-name="T14">def</text:span> <text:span text:style-name="T10">user_login</text:span>(<text:span text:style-name="T11">u</text:span>:<text:span text:style-name="T9">UserLogin</text:span>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d_user</text:span><text:span text:style-name="T16">=</text:span><text:span text:style-name="T15">db</text:span><text:span text:style-name="T17">.</text:span><text:span text:style-name="T18">query</text:span><text:span text:style-name="T17">(</text:span><text:span text:style-name="T19">User</text:span><text:span text:style-name="T17">).</text:span><text:span text:style-name="T18">filter</text:span><text:span text:style-name="T17">( </text:span><text:span text:style-name="T19">User</text:span><text:span text:style-name="T17">.</text:span><text:span text:style-name="T15">email</text:span><text:span text:style-name="T18">==</text:span><text:span text:style-name="T15">u</text:span><text:span text:style-name="T17">.</text:span><text:span text:style-name="T15">email</text:span><text:span text:style-name="T17"> </text:span><text:span text:style-name="T20">and</text:span><text:span text:style-name="T17"> </text:span><text:span text:style-name="T19">User</text:span><text:span text:style-name="T17">.</text:span><text:span text:style-name="T15">password</text:span><text:span text:style-name="T18">==</text:span><text:span text:style-name="T15">u</text:span><text:span text:style-name="T17">.</text:span><text:span text:style-name="T15">password</text:span><text:span text:style-name="T17">).</text:span><text:span text:style-name="T18">first</text:span><text:span text:style-name="T17">()</text:span></text:p>
      <text:p text:style-name="P10">    </text:p>
      <text:p text:style-name="P10">    <text:span text:style-name="T20">if</text:span><text:span text:style-name="T17"> </text:span><text:span text:style-name="T22">not</text:span><text:span text:style-name="T17"> </text:span><text:span text:style-name="T15">d_user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</text:span><text:span text:style-name="T15">detail</text:span><text:span text:style-name="T16">=</text:span><text:span text:style-name="T21">"user is not  register"</text:span><text:span text:style-name="T17">)</text:span></text:p>
      <text:p text:style-name="P10">   </text:p>
      <text:p text:style-name="P10">    <text:span text:style-name="T20">return</text:span><text:span text:style-name="T17"> </text:span><text:span text:style-name="T19">LoginResponse</text:span><text:span text:style-name="T17">( </text:span><text:span text:style-name="T15">message</text:span><text:span text:style-name="T16">=</text:span><text:span text:style-name="T21">"User is now logged in successfully"</text:span><text:span text:style-name="T17">,</text:span><text:span text:style-name="T15">user</text:span><text:span text:style-name="T16">=</text:span><text:span text:style-name="T15">d_user</text:span><text:span text:style-name="T17">  )</text:span></text:p>
      <text:p text:style-name="P12"/>
      <text:p text:style-name="P5"/>
      <text:p text:style-name="P5"/>
      <text:p text:style-name="P6">Project Module</text:p>
      <text:p text:style-name="P5">- POST /projects → Create a new project </text:p>
      <text:p text:style-name="P5">- GET /projects→ List all projects belonging to the authenticated user</text:p>
      <text:p text:style-name="P5">- GET /projects/{id} → Get details of a specific project</text:p>
      <text:p text:style-name="P5">- DELETE /projects/{id} → Delete a project</text:p>
      <text:p text:style-name="P5"/>
      <text:p text:style-name="P7"><text:span text:style-name="T8">from</text:span> <text:span text:style-name="T9">fastapi</text:span> <text:span text:style-name="T8">import</text:span> <text:span text:style-name="T9">APIRouter</text:span>, <text:span text:style-name="T10">Depends</text:span>, <text:span text:style-name="T9">HTTPException</text:span>,<text:span text:style-name="T9">status</text:span></text:p>
      <text:p text:style-name="P8"><text:span text:style-name="T8">from</text:span> <text:span text:style-name="T9">sqlalchemy</text:span>.<text:span text:style-name="T9">orm</text:span> <text:span text:style-name="T8">import</text:span> <text:span text:style-name="T9">Session</text:span></text:p>
      <text:p text:style-name="P8"><text:span text:style-name="T8">from</text:span> <text:span text:style-name="T9">database</text:span> <text:span text:style-name="T8">import</text:span> <text:span text:style-name="T10">get_db</text:span></text:p>
      <text:p text:style-name="P8"><text:span text:style-name="T8">from</text:span> <text:span text:style-name="T9">models</text:span>.<text:span text:style-name="T9">project</text:span> <text:span text:style-name="T8">import</text:span> <text:span text:style-name="T9">Project</text:span></text:p>
      <text:p text:style-name="P8"><text:span text:style-name="T8">from</text:span> <text:span text:style-name="T9">schemas</text:span>.<text:span text:style-name="T9">project_schema</text:span> <text:span text:style-name="T8">import</text:span> <text:span text:style-name="T9">Projectinfo</text:span>,<text:span text:style-name="T9">Projectfind</text:span></text:p>
      <text:p text:style-name="P9"/>
      <text:p text:style-name="P8"><text:span text:style-name="T11">ro</text:span><text:span text:style-name="T12">=</text:span><text:span text:style-name="T9">APIRouter</text:span>()</text:p>
      <text:p text:style-name="P13"/>
      <text:p text:style-name="P11"># Each project can have tasks</text:p>
      <text:p text:style-name="P11"># # Tasks belong to a project</text:p>
      <text:p text:style-name="P11"># pOST /projects</text:p>
      <text:p text:style-name="P11"># GET /projects</text:p>
      <text:p text:style-name="P11"># GET /projects/{id}</text:p>
      <text:p text:style-name="P11"># DELETE /projects/{id}</text:p>
      <text:p text:style-name="P9"/>
      <text:p text:style-name="P8"><text:span text:style-name="T10">@</text:span><text:span text:style-name="T11">ro</text:span><text:span text:style-name="T10">.post</text:span>(<text:span text:style-name="T13">'/'</text:span>,<text:span text:style-name="T11">response_model</text:span><text:span text:style-name="T12">=</text:span><text:span text:style-name="T9">Projectinfo</text:span>)</text:p>
      <text:p text:style-name="P8"><text:span text:style-name="T14">def</text:span> <text:span text:style-name="T10">createProject</text:span>(<text:span text:style-name="T11">p</text:span>:<text:span text:style-name="T9">Projectfind</text:span>, <text:span text:style-name="T11">d</text:span> : <text:span text:style-name="T9">Session</text:span><text:span text:style-name="T12">=</text:span><text:span text:style-name="T10">Depends</text:span>(<text:span text:style-name="T10">get_db</text:span>)):</text:p>
      <text:p text:style-name="P9"><text:soft-page-break/></text:p>
      <text:p text:style-name="P10">    <text:span text:style-name="T15">proj</text:span><text:span text:style-name="T17"> </text:span><text:span text:style-name="T16">=</text:span><text:span text:style-name="T17"> </text:span><text:span text:style-name="T19">Project</text:span><text:span text:style-name="T17">(</text:span></text:p>
      <text:p text:style-name="P10">        <text:span text:style-name="T15">name</text:span><text:span text:style-name="T16">=</text:span><text:span text:style-name="T15">p</text:span><text:span text:style-name="T17">.</text:span><text:span text:style-name="T15">name</text:span><text:span text:style-name="T17">,</text:span></text:p>
      <text:p text:style-name="P10">        <text:span text:style-name="T15">des</text:span><text:span text:style-name="T16">=</text:span><text:span text:style-name="T15">p</text:span><text:span text:style-name="T17">.</text:span><text:span text:style-name="T15">des</text:span><text:span text:style-name="T17">,</text:span></text:p>
      <text:p text:style-name="P10">        <text:span text:style-name="T15">owner_id</text:span><text:span text:style-name="T16">=</text:span><text:span text:style-name="T15">p</text:span><text:span text:style-name="T17">.</text:span><text:span text:style-name="T15">owner_id</text:span></text:p>
      <text:p text:style-name="P10">    <text:span text:style-name="T17">)</text:span></text:p>
      <text:p text:style-name="P10">    </text:p>
      <text:p text:style-name="P10">    <text:span text:style-name="T15">d</text:span><text:span text:style-name="T17">.</text:span><text:span text:style-name="T18">add</text:span><text:span text:style-name="T17">(</text:span><text:span text:style-name="T15">proj</text:span><text:span text:style-name="T17">)</text:span></text:p>
      <text:p text:style-name="P10">    <text:span text:style-name="T15">d</text:span><text:span text:style-name="T17">.</text:span><text:span text:style-name="T18">commit</text:span><text:span text:style-name="T17">()</text:span></text:p>
      <text:p text:style-name="P10">    <text:span text:style-name="T15">d</text:span><text:span text:style-name="T17">.</text:span><text:span text:style-name="T18">refresh</text:span><text:span text:style-name="T17">(</text:span><text:span text:style-name="T15">proj</text:span><text:span text:style-name="T17">)</text:span></text:p>
      <text:p text:style-name="P10">    <text:span text:style-name="T20">return</text:span><text:span text:style-name="T17"> </text:span><text:span text:style-name="T15">proj</text:span></text:p>
      <text:p text:style-name="P9"/>
      <text:p text:style-name="P8"><text:span text:style-name="T10">@</text:span><text:span text:style-name="T11">ro</text:span><text:span text:style-name="T10">.get</text:span>(<text:span text:style-name="T13">'/'</text:span>,<text:span text:style-name="T11">response_model</text:span><text:span text:style-name="T12">=</text:span><text:span text:style-name="T9">Projectinfo</text:span>)</text:p>
      <text:p text:style-name="P8"><text:span text:style-name="T14">def</text:span> <text:span text:style-name="T10">Show_Projects</text:span>(<text:span text:style-name="T11">p</text:span>:<text:span text:style-name="T9">Projectfind</text:span>, <text:span text:style-name="T11">d</text:span> : 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proj</text:span><text:span text:style-name="T17"> </text:span><text:span text:style-name="T16">=</text:span><text:span text:style-name="T17"> </text:span><text:span text:style-name="T15">d</text:span><text:span text:style-name="T17">.</text:span><text:span text:style-name="T18">query</text:span><text:span text:style-name="T17">(</text:span><text:span text:style-name="T19">Project</text:span><text:span text:style-name="T17">).</text:span><text:span text:style-name="T18">filter</text:span><text:span text:style-name="T17">(</text:span><text:span text:style-name="T19">Project</text:span><text:span text:style-name="T17">.</text:span><text:span text:style-name="T15">owner_id</text:span><text:span text:style-name="T18">==</text:span><text:span text:style-name="T15">p</text:span><text:span text:style-name="T17">.</text:span><text:span text:style-name="T15">owner_id</text:span><text:span text:style-name="T17">).</text:span><text:span text:style-name="T18">all</text:span><text:span text:style-name="T17">()</text:span></text:p>
      <text:p text:style-name="P9"/>
      <text:p text:style-name="P10">    <text:span text:style-name="T20">return</text:span><text:span text:style-name="T17"> </text:span><text:span text:style-name="T15">proj</text:span></text:p>
      <text:p text:style-name="P8"><text:span text:style-name="T10">@</text:span><text:span text:style-name="T11">ro</text:span><text:span text:style-name="T10">.get</text:span>(<text:span text:style-name="T13">'/</text:span><text:span text:style-name="T14">{id}</text:span><text:span text:style-name="T13">'</text:span>,<text:span text:style-name="T11">response_model</text:span><text:span text:style-name="T12">=</text:span><text:span text:style-name="T9">Projectinfo</text:span>)</text:p>
      <text:p text:style-name="P8"><text:span text:style-name="T14">def</text:span> <text:span text:style-name="T10">Show_Projects</text:span>(<text:span text:style-name="T11">id</text:span>:<text:span text:style-name="T9">int</text:span>, <text:span text:style-name="T11">d</text:span> : 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<text:span text:style-name="T15">proj</text:span><text:span text:style-name="T17"> </text:span><text:span text:style-name="T16">=</text:span><text:span text:style-name="T17"> </text:span><text:span text:style-name="T15">d</text:span><text:span text:style-name="T17">.</text:span><text:span text:style-name="T18">query</text:span><text:span text:style-name="T17">(</text:span><text:span text:style-name="T19">Project</text:span><text:span text:style-name="T17">).</text:span><text:span text:style-name="T18">filter</text:span><text:span text:style-name="T17">(</text:span><text:span text:style-name="T19">Project</text:span><text:span text:style-name="T17">.</text:span><text:span text:style-name="T15">id</text:span><text:span text:style-name="T17"> </text:span><text:span text:style-name="T18">==</text:span><text:span text:style-name="T17"> </text:span><text:span text:style-name="T15">id</text:span><text:span text:style-name="T17">).</text:span><text:span text:style-name="T18">first</text:span><text:span text:style-name="T17">()</text:span></text:p>
      <text:p text:style-name="P10">   <text:span text:style-name="T20">if</text:span><text:span text:style-name="T17"> </text:span><text:span text:style-name="T22">not</text:span><text:span text:style-name="T17"> </text:span><text:span text:style-name="T15">proj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 </text:span><text:span text:style-name="T15">detail</text:span><text:span text:style-name="T16">=</text:span><text:span text:style-name="T21">"Project not found"</text:span><text:span text:style-name="T17">)</text:span></text:p>
      <text:p text:style-name="P10">   <text:span text:style-name="T20">return</text:span><text:span text:style-name="T17"> </text:span><text:span text:style-name="T15">proj</text:span></text:p>
      <text:p text:style-name="P9"/>
      <text:p text:style-name="P8"><text:span text:style-name="T10">@</text:span><text:span text:style-name="T11">ro</text:span><text:span text:style-name="T10">.delete</text:span>(<text:span text:style-name="T13">'/</text:span><text:span text:style-name="T14">{id}</text:span><text:span text:style-name="T13">'</text:span>)</text:p>
      <text:p text:style-name="P8"><text:span text:style-name="T14">def</text:span> <text:span text:style-name="T10">Del_Projects</text:span>(<text:span text:style-name="T11">id</text:span>:<text:span text:style-name="T9">int</text:span>, <text:span text:style-name="T11">d</text:span> : 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<text:span text:style-name="T15">proj</text:span><text:span text:style-name="T17"> </text:span><text:span text:style-name="T16">=</text:span><text:span text:style-name="T17"> </text:span><text:span text:style-name="T15">d</text:span><text:span text:style-name="T17">.</text:span><text:span text:style-name="T18">query</text:span><text:span text:style-name="T17">(</text:span><text:span text:style-name="T19">Project</text:span><text:span text:style-name="T17">).</text:span><text:span text:style-name="T18">filter</text:span><text:span text:style-name="T17">(</text:span><text:span text:style-name="T19">Project</text:span><text:span text:style-name="T17">.</text:span><text:span text:style-name="T15">id</text:span><text:span text:style-name="T17"> </text:span><text:span text:style-name="T18">==</text:span><text:span text:style-name="T17"> </text:span><text:span text:style-name="T15">id</text:span><text:span text:style-name="T17">).</text:span><text:span text:style-name="T18">first</text:span><text:span text:style-name="T17">()</text:span></text:p>
      <text:p text:style-name="P10">   <text:span text:style-name="T20">if</text:span><text:span text:style-name="T17"> </text:span><text:span text:style-name="T22">not</text:span><text:span text:style-name="T17"> </text:span><text:span text:style-name="T15">proj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 </text:span><text:span text:style-name="T15">detail</text:span><text:span text:style-name="T16">=</text:span><text:span text:style-name="T21">"Project not found"</text:span><text:span text:style-name="T17">)</text:span></text:p>
      <text:p text:style-name="P10">   <text:span text:style-name="T15">d</text:span><text:span text:style-name="T17">.</text:span><text:span text:style-name="T18">delete</text:span><text:span text:style-name="T17">(</text:span><text:span text:style-name="T15">proj</text:span><text:span text:style-name="T17">)</text:span></text:p>
      <text:p text:style-name="P10">   <text:span text:style-name="T15">d</text:span><text:span text:style-name="T17">.</text:span><text:span text:style-name="T18">commit</text:span><text:span text:style-name="T17">()</text:span></text:p>
      <text:p text:style-name="P10">   <text:span text:style-name="T20">return</text:span><text:span text:style-name="T17"> {</text:span><text:span text:style-name="T21">"msg"</text:span><text:span text:style-name="T17">:</text:span><text:span text:style-name="T22">f</text:span><text:span text:style-name="T21">"project </text:span><text:span text:style-name="T22">{</text:span><text:span text:style-name="T15">id</text:span><text:span text:style-name="T22">}</text:span><text:span text:style-name="T21"> is deleted "</text:span><text:span text:style-name="T17">}</text:span></text:p>
      <text:p text:style-name="P5"/>
      <text:p text:style-name="P5"/>
      <text:p text:style-name="P5"><text:s/><text:span text:style-name="T7">Task Module</text:span></text:p>
      <text:p text:style-name="P5">- POST /projects/{id}/tasks → Create a new task inside a project (title, description, status)</text:p>
      <text:p text:style-name="P5">- GET /projects/{id}/tasks → List all tasks for a specific project</text:p>
      <text:p text:style-name="P5">- PUT /tasks/{task_id} → Update a task </text:p>
      <text:p text:style-name="P5">- DELETE /tasks/{task_id} → Delete a task</text:p>
      <text:p text:style-name="P5"/>
      <text:p text:style-name="P7"><text:span text:style-name="T8">from</text:span> <text:span text:style-name="T9">fastapi</text:span> <text:span text:style-name="T8">import</text:span> <text:span text:style-name="T9">APIRouter</text:span>, <text:span text:style-name="T10">Depends</text:span>, <text:span text:style-name="T9">HTTPException</text:span>,<text:span text:style-name="T9">status</text:span></text:p>
      <text:p text:style-name="P8"><text:span text:style-name="T8">from</text:span> <text:span text:style-name="T9">sqlalchemy</text:span>.<text:span text:style-name="T9">orm</text:span> <text:span text:style-name="T8">import</text:span> <text:span text:style-name="T9">Session</text:span></text:p>
      <text:p text:style-name="P8"><text:span text:style-name="T8">from</text:span> <text:span text:style-name="T9">database</text:span> <text:span text:style-name="T8">import</text:span> <text:span text:style-name="T10">get_db</text:span></text:p>
      <text:p text:style-name="P8"><text:soft-page-break/><text:span text:style-name="T8">from</text:span> <text:span text:style-name="T9">models</text:span>.<text:span text:style-name="T9">task</text:span> <text:span text:style-name="T8">import</text:span> <text:span text:style-name="T9">Task</text:span></text:p>
      <text:p text:style-name="P8"><text:span text:style-name="T8">from</text:span> <text:span text:style-name="T9">models</text:span>.<text:span text:style-name="T9">project</text:span> <text:span text:style-name="T8">import</text:span> <text:span text:style-name="T9">Project</text:span></text:p>
      <text:p text:style-name="P8"><text:span text:style-name="T8">from</text:span> <text:span text:style-name="T9">schemas</text:span>.<text:span text:style-name="T9">task_schema</text:span> <text:span text:style-name="T8">import</text:span> <text:span text:style-name="T9">tasks</text:span>,<text:span text:style-name="T9">tasksIn</text:span></text:p>
      <text:p text:style-name="P8"><text:span text:style-name="T8">from</text:span> <text:span text:style-name="T9">typing</text:span> <text:span text:style-name="T8">import</text:span> <text:span text:style-name="T9">List</text:span></text:p>
      <text:p text:style-name="P13"/>
      <text:p text:style-name="P11"># POST /projects/{id}/tasks</text:p>
      <text:p text:style-name="P11"># GET /projects/{id}/tasks</text:p>
      <text:p text:style-name="P11"># PUT /tasks/{task_id}</text:p>
      <text:p text:style-name="P11"># DELETE /tasks/{task_id</text:p>
      <text:p text:style-name="P11"># Tasks belong to a project</text:p>
      <text:p text:style-name="P11"># Tasks have status (pending, in_progress, completed</text:p>
      <text:p text:style-name="P9"/>
      <text:p text:style-name="P8"><text:span text:style-name="T11">rou</text:span><text:span text:style-name="T12">=</text:span><text:span text:style-name="T9">APIRouter</text:span>()</text:p>
      <text:p text:style-name="P9"/>
      <text:p text:style-name="P8"><text:span text:style-name="T10">@</text:span><text:span text:style-name="T11">rou</text:span><text:span text:style-name="T10">.post</text:span>(<text:span text:style-name="T13">'/projects/</text:span><text:span text:style-name="T14">{P_id}</text:span><text:span text:style-name="T13">/tasks'</text:span>,<text:span text:style-name="T11">response_model</text:span><text:span text:style-name="T12">=</text:span><text:span text:style-name="T9">tasks</text:span>)</text:p>
      <text:p text:style-name="P8"><text:span text:style-name="T14">def</text:span> <text:span text:style-name="T10">create_task</text:span>(<text:span text:style-name="T11">P_id</text:span>,<text:span text:style-name="T11">t</text:span>:<text:span text:style-name="T9">tasksIn</text:span>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10">    <text:span text:style-name="T15">proj</text:span><text:span text:style-name="T17"> </text:span><text:span text:style-name="T16">=</text:span><text:span text:style-name="T17"> </text:span><text:span text:style-name="T15">db</text:span><text:span text:style-name="T17">.</text:span><text:span text:style-name="T18">query</text:span><text:span text:style-name="T17">(</text:span><text:span text:style-name="T19">Project</text:span><text:span text:style-name="T17">).</text:span><text:span text:style-name="T18">filter</text:span><text:span text:style-name="T17">(</text:span><text:span text:style-name="T19">Project</text:span><text:span text:style-name="T17">.</text:span><text:span text:style-name="T15">id</text:span><text:span text:style-name="T17"> </text:span><text:span text:style-name="T18">==</text:span><text:span text:style-name="T17"> </text:span><text:span text:style-name="T15">P_id</text:span><text:span text:style-name="T17">).</text:span><text:span text:style-name="T18">first</text:span><text:span text:style-name="T17">()</text:span></text:p>
      <text:p text:style-name="P10">    <text:span text:style-name="T20">if</text:span><text:span text:style-name="T17">  </text:span><text:span text:style-name="T22">not</text:span><text:span text:style-name="T17"> </text:span><text:span text:style-name="T15">proj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</text:span><text:span text:style-name="T15">detail</text:span><text:span text:style-name="T16">=</text:span><text:span text:style-name="T21">"project id is not present in db"</text:span><text:span text:style-name="T17">)</text:span></text:p>
      <text:p text:style-name="P10">    <text:span text:style-name="T15">my_task</text:span><text:span text:style-name="T16">=</text:span><text:span text:style-name="T19">Task</text:span><text:span text:style-name="T17">(</text:span></text:p>
      <text:p text:style-name="P10">        </text:p>
      <text:p text:style-name="P10">        <text:span text:style-name="T15">title</text:span><text:span text:style-name="T16">=</text:span><text:span text:style-name="T15">t</text:span><text:span text:style-name="T17">.</text:span><text:span text:style-name="T15">title</text:span><text:span text:style-name="T17">,</text:span></text:p>
      <text:p text:style-name="P10">        <text:span text:style-name="T15">des</text:span><text:span text:style-name="T16">=</text:span><text:span text:style-name="T15">t</text:span><text:span text:style-name="T17">.</text:span><text:span text:style-name="T15">des</text:span><text:span text:style-name="T17">,</text:span></text:p>
      <text:p text:style-name="P10">        <text:span text:style-name="T15">status</text:span><text:span text:style-name="T16">=</text:span><text:span text:style-name="T15">t</text:span><text:span text:style-name="T17">.</text:span><text:span text:style-name="T15">status</text:span><text:span text:style-name="T17">,</text:span></text:p>
      <text:p text:style-name="P10">        <text:span text:style-name="T15">project_id</text:span><text:span text:style-name="T16">=</text:span><text:span text:style-name="T15">P_id</text:span></text:p>
      <text:p text:style-name="P13"/>
      <text:p text:style-name="P10">    <text:span text:style-name="T17">)</text:span></text:p>
      <text:p text:style-name="P10">    <text:span text:style-name="T15">db</text:span><text:span text:style-name="T17">.</text:span><text:span text:style-name="T18">add</text:span><text:span text:style-name="T17">(</text:span><text:span text:style-name="T15">my_task</text:span><text:span text:style-name="T17">)</text:span></text:p>
      <text:p text:style-name="P10">    <text:span text:style-name="T15">db</text:span><text:span text:style-name="T17">.</text:span><text:span text:style-name="T18">commit</text:span><text:span text:style-name="T17">()</text:span></text:p>
      <text:p text:style-name="P10">    <text:span text:style-name="T15">db</text:span><text:span text:style-name="T17">.</text:span><text:span text:style-name="T18">refresh</text:span><text:span text:style-name="T17">(</text:span><text:span text:style-name="T15">my_task</text:span><text:span text:style-name="T17">)</text:span></text:p>
      <text:p text:style-name="P10">    <text:span text:style-name="T20">return</text:span><text:span text:style-name="T17"> </text:span><text:span text:style-name="T15">my_task</text:span></text:p>
      <text:p text:style-name="P9"/>
      <text:p text:style-name="P10"> <text:span text:style-name="T23">#get all task of one project</text:span></text:p>
      <text:p text:style-name="P8"><text:span text:style-name="T10">@</text:span><text:span text:style-name="T11">rou</text:span><text:span text:style-name="T10">.get</text:span>(<text:span text:style-name="T13">'/projects/</text:span><text:span text:style-name="T14">{p_id}</text:span><text:span text:style-name="T13">/tasks'</text:span>,<text:span text:style-name="T11">response_model</text:span><text:span text:style-name="T12">=</text:span><text:span text:style-name="T9">List</text:span>[<text:span text:style-name="T9">tasks</text:span>])</text:p>
      <text:p text:style-name="P8"><text:span text:style-name="T14">def</text:span> <text:span text:style-name="T10">show_task</text:span>(<text:span text:style-name="T11">p_id</text:span>:<text:span text:style-name="T9">int</text:span> 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my_task</text:span><text:span text:style-name="T16">=</text:span><text:span text:style-name="T15">db</text:span><text:span text:style-name="T17">.</text:span><text:span text:style-name="T18">query</text:span><text:span text:style-name="T17">(</text:span><text:span text:style-name="T19">Task</text:span><text:span text:style-name="T17">).</text:span><text:span text:style-name="T18">filter</text:span><text:span text:style-name="T17">(</text:span><text:span text:style-name="T19">Task</text:span><text:span text:style-name="T17">.</text:span><text:span text:style-name="T15">project_id</text:span><text:span text:style-name="T18">==</text:span><text:span text:style-name="T15">p_id</text:span><text:span text:style-name="T17">).</text:span><text:span text:style-name="T18">all</text:span><text:span text:style-name="T17">()</text:span></text:p>
      <text:p text:style-name="P10">    <text:span text:style-name="T20">if</text:span><text:span text:style-name="T17"> </text:span><text:span text:style-name="T22">not</text:span><text:span text:style-name="T17"> </text:span><text:span text:style-name="T15">my_task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</text:span><text:span text:style-name="T15">detail</text:span><text:span text:style-name="T16">=</text:span><text:span text:style-name="T21">"Project id is not found "</text:span><text:span text:style-name="T17">)</text:span></text:p>
      <text:p text:style-name="P10">    <text:span text:style-name="T20">return</text:span><text:span text:style-name="T17"> </text:span><text:span text:style-name="T15">my_task</text:span></text:p>
      <text:p text:style-name="P13"/>
      <text:p text:style-name="P11"># PUT /tasks/{task_id}</text:p>
      <text:p text:style-name="P8"><text:soft-page-break/><text:span text:style-name="T10">@</text:span><text:span text:style-name="T11">rou</text:span><text:span text:style-name="T10">.put</text:span>(<text:span text:style-name="T13">'/tasks/</text:span><text:span text:style-name="T14">{task_id}</text:span><text:span text:style-name="T13">'</text:span>,<text:span text:style-name="T11">response_model</text:span><text:span text:style-name="T12">=</text:span><text:span text:style-name="T9">tasks</text:span>)</text:p>
      <text:p text:style-name="P8"><text:span text:style-name="T14">def</text:span> <text:span text:style-name="T10">update_task</text:span>(<text:span text:style-name="T11">t_id</text:span>:<text:span text:style-name="T9">int</text:span> ,<text:span text:style-name="T11">t</text:span>:<text:span text:style-name="T9">tasks</text:span>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my_task</text:span><text:span text:style-name="T16">=</text:span><text:span text:style-name="T15">db</text:span><text:span text:style-name="T17">.</text:span><text:span text:style-name="T18">query</text:span><text:span text:style-name="T17">(</text:span><text:span text:style-name="T19">Task</text:span><text:span text:style-name="T17">).</text:span><text:span text:style-name="T18">filter</text:span><text:span text:style-name="T17">(</text:span><text:span text:style-name="T19">Task</text:span><text:span text:style-name="T17">.</text:span><text:span text:style-name="T15">id</text:span><text:span text:style-name="T18">==</text:span><text:span text:style-name="T15">t_id</text:span><text:span text:style-name="T17">).</text:span><text:span text:style-name="T18">first</text:span><text:span text:style-name="T17">()</text:span></text:p>
      <text:p text:style-name="P10">    <text:span text:style-name="T20">if</text:span><text:span text:style-name="T17"> </text:span><text:span text:style-name="T22">not</text:span><text:span text:style-name="T17"> </text:span><text:span text:style-name="T15">my_task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</text:span><text:span text:style-name="T15">detail</text:span><text:span text:style-name="T16">=</text:span><text:span text:style-name="T21">"Project id is not found "</text:span><text:span text:style-name="T17">)</text:span></text:p>
      <text:p text:style-name="P10">    <text:span text:style-name="T15">my_task</text:span><text:span text:style-name="T17">.</text:span><text:span text:style-name="T15">title</text:span><text:span text:style-name="T16">=</text:span><text:span text:style-name="T15">t</text:span><text:span text:style-name="T17">.</text:span><text:span text:style-name="T15">title</text:span></text:p>
      <text:p text:style-name="P10">    <text:span text:style-name="T15">my_task</text:span><text:span text:style-name="T17">.</text:span><text:span text:style-name="T15">des</text:span><text:span text:style-name="T16">=</text:span><text:span text:style-name="T15">t</text:span><text:span text:style-name="T17">.</text:span><text:span text:style-name="T15">des</text:span></text:p>
      <text:p text:style-name="P10">    <text:span text:style-name="T15">my_task</text:span><text:span text:style-name="T17">.</text:span><text:span text:style-name="T15">status</text:span><text:span text:style-name="T16">=</text:span><text:span text:style-name="T15">t</text:span><text:span text:style-name="T17">.</text:span><text:span text:style-name="T15">status</text:span></text:p>
      <text:p text:style-name="P10">    <text:span text:style-name="T15">my_task</text:span><text:span text:style-name="T17">.</text:span><text:span text:style-name="T15">project_id</text:span><text:span text:style-name="T16">=</text:span><text:span text:style-name="T15">t</text:span><text:span text:style-name="T17">.</text:span><text:span text:style-name="T15">project_id</text:span></text:p>
      <text:p text:style-name="P9"/>
      <text:p text:style-name="P10">    <text:span text:style-name="T15">db</text:span><text:span text:style-name="T17">.</text:span><text:span text:style-name="T18">commit</text:span><text:span text:style-name="T17">()</text:span></text:p>
      <text:p text:style-name="P10">    <text:span text:style-name="T15">db</text:span><text:span text:style-name="T17">.</text:span><text:span text:style-name="T18">refresh</text:span><text:span text:style-name="T17">(</text:span><text:span text:style-name="T15">my_task</text:span><text:span text:style-name="T17">)</text:span></text:p>
      <text:p text:style-name="P9"/>
      <text:p text:style-name="P10">    <text:span text:style-name="T20">return</text:span><text:span text:style-name="T17"> </text:span><text:span text:style-name="T15">my_task</text:span></text:p>
      <text:p text:style-name="P9"/>
      <text:p text:style-name="P10">   <text:span text:style-name="T23"># del /tasks/{task_id}</text:span></text:p>
      <text:p text:style-name="P8"><text:span text:style-name="T10">@</text:span><text:span text:style-name="T11">rou</text:span><text:span text:style-name="T10">.delete</text:span>(<text:span text:style-name="T13">'/tasks/</text:span><text:span text:style-name="T14">{task_id}</text:span><text:span text:style-name="T13">'</text:span>)</text:p>
      <text:p text:style-name="P8"><text:span text:style-name="T14">def</text:span> <text:span text:style-name="T10">del_task</text:span>(<text:span text:style-name="T11">t_id</text:span>:<text:span text:style-name="T9">int</text:span> ,<text:span text:style-name="T11">db</text:span>:<text:span text:style-name="T9">Session</text:span><text:span text:style-name="T12">=</text:span><text:span text:style-name="T10">Depends</text:span>(<text:span text:style-name="T10">get_db</text:span>)):</text:p>
      <text:p text:style-name="P9"/>
      <text:p text:style-name="P10">    <text:span text:style-name="T15">my_task</text:span><text:span text:style-name="T16">=</text:span><text:span text:style-name="T15">db</text:span><text:span text:style-name="T17">.</text:span><text:span text:style-name="T18">query</text:span><text:span text:style-name="T17">(</text:span><text:span text:style-name="T19">Task</text:span><text:span text:style-name="T17">).</text:span><text:span text:style-name="T18">filter</text:span><text:span text:style-name="T17">(</text:span><text:span text:style-name="T19">Task</text:span><text:span text:style-name="T17">.</text:span><text:span text:style-name="T15">id</text:span><text:span text:style-name="T18">==</text:span><text:span text:style-name="T15">t_id</text:span><text:span text:style-name="T17">).</text:span><text:span text:style-name="T18">first</text:span><text:span text:style-name="T17">()</text:span></text:p>
      <text:p text:style-name="P10">    <text:span text:style-name="T20">if</text:span><text:span text:style-name="T17"> </text:span><text:span text:style-name="T22">not</text:span><text:span text:style-name="T17"> </text:span><text:span text:style-name="T15">my_task</text:span><text:span text:style-name="T17">:</text:span></text:p>
      <text:p text:style-name="P10">        <text:span text:style-name="T20">raise</text:span><text:span text:style-name="T17"> </text:span><text:span text:style-name="T19">HTTPException</text:span><text:span text:style-name="T17">(</text:span><text:span text:style-name="T15">status_code</text:span><text:span text:style-name="T16">=</text:span><text:span text:style-name="T19">status</text:span><text:span text:style-name="T17">.</text:span><text:span text:style-name="T15">HTTP_404_NOT_FOUND</text:span><text:span text:style-name="T17">,</text:span><text:span text:style-name="T15">detail</text:span><text:span text:style-name="T16">=</text:span><text:span text:style-name="T21">"task id is not found "</text:span><text:span text:style-name="T17">)</text:span></text:p>
      <text:p text:style-name="P10">    <text:span text:style-name="T20">else</text:span><text:span text:style-name="T17">:</text:span></text:p>
      <text:p text:style-name="P10">        <text:span text:style-name="T15">db</text:span><text:span text:style-name="T17">.</text:span><text:span text:style-name="T18">delete</text:span><text:span text:style-name="T17">(</text:span><text:span text:style-name="T15">my_task</text:span><text:span text:style-name="T17">)</text:span></text:p>
      <text:p text:style-name="P10">        <text:span text:style-name="T15">db</text:span><text:span text:style-name="T17">.</text:span><text:span text:style-name="T18">commit</text:span><text:span text:style-name="T17">()</text:span></text:p>
      <text:p text:style-name="P10">    </text:p>
      <text:p text:style-name="P9"/>
      <text:p text:style-name="P10">    <text:span text:style-name="T20">return</text:span><text:span text:style-name="T17"> {</text:span><text:span text:style-name="T21">"msg"</text:span><text:span text:style-name="T17">:</text:span><text:span text:style-name="T22">f</text:span><text:span text:style-name="T21">"task </text:span><text:span text:style-name="T22">{</text:span><text:span text:style-name="T15">t_id</text:span><text:span text:style-name="T22">}</text:span><text:span text:style-name="T21"> is deleted"</text:span><text:span text:style-name="T17">}</text:span></text:p>
      <text:p text:style-name="P14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5:24:36.318466000</meta:creation-date>
    <dc:date>2026-02-16T15:33:51.057493900</dc:date>
    <meta:editing-duration>PT9M14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157" meta:word-count="515" meta:character-count="5720" meta:non-whitespace-character-count="4953"/>
  </office:meta>
</office:document-meta>
</file>